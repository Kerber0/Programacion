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0000000B304A0E586.png" manifest:media-type="image/png"/>
  <manifest:file-entry manifest:full-path="Pictures/10000001000002AF00000354ED368A7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a1" style:family="table">
      <style:table-properties style:width="7.389cm" table:align="left"/>
    </style:style>
    <style:style style:name="Tabla1.A" style:family="table-column">
      <style:table-column-properties style:column-width="3.194cm"/>
    </style:style>
    <style:style style:name="Tabla1.B" style:family="table-column">
      <style:table-column-properties style:column-width="1.605cm"/>
    </style:style>
    <style:style style:name="Tabla1.C" style:family="table-column">
      <style:table-column-properties style:column-width="2.589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7.352cm" table:align="left"/>
    </style:style>
    <style:style style:name="Tabla2.A" style:family="table-column">
      <style:table-column-properties style:column-width="3.272cm"/>
    </style:style>
    <style:style style:name="Tabla2.B" style:family="table-column">
      <style:table-column-properties style:column-width="1.49cm"/>
    </style:style>
    <style:style style:name="Tabla2.C" style:family="table-column">
      <style:table-column-properties style:column-width="2.589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7.352cm" table:align="left"/>
    </style:style>
    <style:style style:name="Tabla3.A" style:family="table-column">
      <style:table-column-properties style:column-width="3.272cm"/>
    </style:style>
    <style:style style:name="Tabla3.B" style:family="table-column">
      <style:table-column-properties style:column-width="1.528cm"/>
    </style:style>
    <style:style style:name="Tabla3.C" style:family="table-column">
      <style:table-column-properties style:column-width="2.552cm"/>
    </style:style>
    <style:style style:name="Tabla3.A1" style:family="table-cell">
      <style:table-cell-properties style:vertical-align="middle" fo:padding="0.049cm" fo:border="none"/>
    </style:style>
    <style:style style:name="Tabla4" style:family="table">
      <style:table-properties style:width="7.352cm" table:align="left"/>
    </style:style>
    <style:style style:name="Tabla4.A" style:family="table-column">
      <style:table-column-properties style:column-width="3.272cm"/>
    </style:style>
    <style:style style:name="Tabla4.B" style:family="table-column">
      <style:table-column-properties style:column-width="1.49cm"/>
    </style:style>
    <style:style style:name="Tabla4.C" style:family="table-column">
      <style:table-column-properties style:column-width="2.589cm"/>
    </style:style>
    <style:style style:name="Tabla4.A1" style:family="table-cell">
      <style:table-cell-properties style:vertical-align="middle" fo:padding="0.049cm" fo:border="none"/>
    </style:style>
    <style:style style:name="Tabla5" style:family="table">
      <style:table-properties style:width="7.352cm" table:align="left"/>
    </style:style>
    <style:style style:name="Tabla5.A" style:family="table-column">
      <style:table-column-properties style:column-width="3.272cm"/>
    </style:style>
    <style:style style:name="Tabla5.B" style:family="table-column">
      <style:table-column-properties style:column-width="1.49cm"/>
    </style:style>
    <style:style style:name="Tabla5.C" style:family="table-column">
      <style:table-column-properties style:column-width="2.589cm"/>
    </style:style>
    <style:style style:name="Tabla5.A1" style:family="table-cell">
      <style:table-cell-properties style:vertical-align="middle" fo:padding="0.049cm" fo:border="none"/>
    </style:style>
    <style:style style:name="P1" style:family="paragraph" style:parent-style-name="Heading_20_1">
      <style:paragraph-properties fo:margin-left="0cm" fo:margin-right="0cm" fo:text-align="center" style:justify-single-word="false" fo:text-indent="0cm" style:auto-text-indent="false"/>
    </style:style>
    <style:style style:name="P2" style:family="paragraph" style:parent-style-name="Standard">
      <style:text-properties officeooo:paragraph-rsid="0011e1de"/>
    </style:style>
    <style:style style:name="P3" style:family="paragraph" style:parent-style-name="Standard">
      <style:text-properties fo:font-weight="bold" officeooo:paragraph-rsid="00183794" style:font-weight-asian="bold" style:font-weight-complex="bold"/>
    </style:style>
    <style:style style:name="P4" style:family="paragraph" style:parent-style-name="Standard">
      <style:text-properties fo:font-weight="bold" officeooo:paragraph-rsid="0015476a" style:font-weight-asian="bold" style:font-weight-complex="bold"/>
    </style:style>
    <style:style style:name="P5" style:family="paragraph" style:parent-style-name="Standard">
      <style:text-properties fo:font-weight="bold" officeooo:paragraph-rsid="0016a42b" style:font-weight-asian="bold" style:font-weight-complex="bold"/>
    </style:style>
    <style:style style:name="P6" style:family="paragraph" style:parent-style-name="Standard">
      <style:text-properties officeooo:paragraph-rsid="00183794"/>
    </style:style>
    <style:style style:name="P7" style:family="paragraph" style:parent-style-name="Standard">
      <style:text-properties fo:font-weight="normal" officeooo:rsid="00183794" officeooo:paragraph-rsid="00183794" style:font-weight-asian="normal" style:font-weight-complex="normal"/>
    </style:style>
    <style:style style:name="P8" style:family="paragraph" style:parent-style-name="Standard">
      <style:text-properties fo:font-weight="bold" officeooo:rsid="0013492f" officeooo:paragraph-rsid="0013492f" style:font-weight-asian="bold" style:font-weight-complex="bold"/>
    </style:style>
    <style:style style:name="P9" style:family="paragraph" style:parent-style-name="Standard">
      <style:text-properties officeooo:rsid="0013492f" officeooo:paragraph-rsid="0013492f"/>
    </style:style>
    <style:style style:name="P10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T1" style:family="text">
      <style:text-properties officeooo:rsid="0011e1d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5476a"/>
    </style:style>
    <style:style style:name="T4" style:family="text">
      <style:text-properties fo:font-weight="normal" officeooo:rsid="0015476a" style:font-weight-asian="normal" style:font-weight-complex="normal"/>
    </style:style>
    <style:style style:name="T5" style:family="text">
      <style:text-properties fo:font-weight="normal" officeooo:rsid="00183794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6a42b" style:font-weight-asian="normal" style:font-weight-complex="normal"/>
    </style:style>
    <style:style style:name="T8" style:family="text">
      <style:text-properties fo:font-weight="bold" officeooo:rsid="00183794" style:font-weight-asian="bold" style:font-weight-complex="bold"/>
    </style:style>
    <style:style style:name="T9" style:family="text">
      <style:text-properties officeooo:rsid="00183794"/>
    </style:style>
    <style:style style:name="T10" style:family="text">
      <style:text-properties officeooo:rsid="0016a42b"/>
    </style:style>
    <style:style style:name="T11" style:family="text">
      <style:text-properties fo:color="#bcbec4" loext:opacity="100%" fo:font-family="'JetBrains Mono'" style:font-family-generic="roman" style:font-pitch="variable" fo:font-size="12pt" fo:font-style="normal" fo:font-weight="normal" style:font-size-asian="12pt" style:font-style-asian="normal" style:font-weight-asian="normal"/>
    </style:style>
    <style:style style:name="T12" style:family="text">
      <style:text-properties fo:color="#cf8e6d" loext:opacity="100%" fo:font-family="'JetBrains Mono'" style:font-family-generic="roman" style:font-pitch="variable" fo:font-size="12pt" fo:font-style="normal" fo:font-weight="normal" style:font-size-asian="12pt" style:font-style-asian="normal" style:font-weight-asian="normal"/>
    </style:style>
    <style:style style:name="T13" style:family="text">
      <style:text-properties fo:color="#c77dbb" loext:opacity="100%" fo:font-family="'JetBrains Mono'" style:font-family-generic="roman" style:font-pitch="variable" fo:font-size="12pt" fo:font-style="normal" fo:font-weight="normal" style:font-size-asian="12pt" style:font-style-asian="normal" style:font-weight-asian="normal"/>
    </style:style>
    <style:style style:name="T14" style:family="text">
      <style:text-properties fo:color="#56a8f5" loext:opacity="100%" fo:font-family="'JetBrains Mono'" style:font-family-generic="roman" style:font-pitch="variable" fo:font-size="12pt" fo:font-style="normal" fo:font-weight="normal" style:font-size-asian="12pt" style:font-style-asian="normal" style:font-weight-asian="normal"/>
    </style:style>
    <style:style style:name="T15" style:family="text">
      <style:text-properties fo:color="#b3ae60" loext:opacity="100%" fo:font-family="'JetBrains Mono'" style:font-family-generic="roman" style:font-pitch="variable" fo:font-size="12pt" fo:font-style="normal" fo:font-weight="normal" style:font-size-asian="12pt" style:font-style-asian="normal" style:font-weight-asian="normal"/>
    </style:style>
    <style:style style:name="T16" style:family="text">
      <style:text-properties fo:color="#2aacb8" loext:opacity="100%" fo:font-family="'JetBrains Mono'" style:font-family-generic="roman" style:font-pitch="variable" fo:font-size="12pt" fo:font-style="normal" fo:font-weight="normal" style:font-size-asian="12pt" style:font-style-asian="normal" style:font-weight-asian="normal"/>
    </style:style>
    <style:style style:name="T17" style:family="text">
      <style:text-properties fo:color="#c77dbb" loext:opacity="100%" fo:font-family="'JetBrains Mono'" style:font-family-generic="roman" style:font-pitch="variable" fo:font-size="12pt" fo:font-style="italic" fo:font-weight="normal" style:font-size-asian="12pt" style:font-style-asian="italic" style:font-weight-asian="normal"/>
    </style:style>
    <style:style style:name="T18" style:family="text">
      <style:text-properties fo:color="#6aab73" loext:opacity="100%" fo:font-family="'JetBrains Mono'" style:font-family-generic="roman" style:font-pitch="variable" fo:font-size="12pt" fo:font-style="normal" fo:font-weight="normal" style:font-size-asian="12pt" style:font-style-asian="normal" style:font-weight-asian="normal"/>
    </style:style>
    <style:style style:name="T19" style:family="text">
      <style:text-properties fo:color="#bcbec4" loext:opacity="100%" fo:font-family="'JetBrains Mono'" style:font-family-generic="roman" style:font-pitch="variable" fo:font-size="12pt" fo:font-style="italic" fo:font-weight="normal" style:font-size-asian="12pt" style:font-style-asian="italic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P</text:span>M_Tarea2</text:h>
      <text:p text:style-name="Standard"/>
      <text:p text:style-name="Standard"/>
      <text:p text:style-name="Standard"/>
      <text:p text:style-name="P2"><text:span text:style-name="T2">1)</text:span> A partir del siguiente conjunto de instrucciones indica las que se pueden ejecutar concurrentemente y las que no:</text:p>
      <text:p text:style-name="P2"/>
      <text:p text:style-name="P2"><draw:frame draw:style-name="fr1" draw:name="Imagen1" text:anchor-type="char" svg:x="0.005cm" svg:y="0.108cm" svg:width="12.264cm" svg:height="3.431cm" draw:z-index="0"><draw:image xlink:href="Pictures/1000000100000280000000B304A0E58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Table_20_Heading">Instrucción</text:p>
            </table:table-cell>
            <table:table-cell table:style-name="Tabla1.A1" office:value-type="string">
              <text:p text:style-name="Table_20_Heading">Lectura (R)</text:p>
            </table:table-cell>
            <table:table-cell table:style-name="Tabla1.A1" office:value-type="string">
              <text:p text:style-name="Table_20_Heading">Escritura (W)</text:p>
            </table:table-cell>
          </table:table-row>
        </table:table-header-rows>
      </table:table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Table_20_Contents">1️⃣ <text:span text:style-name="Source_20_Text">a := x + y</text:span></text:p>
          </table:table-cell>
          <table:table-cell table:style-name="Tabla2.A1" office:value-type="string">
            <text:p text:style-name="Table_20_Contents"><text:span text:style-name="T3">R</text:span>{x, y}</text:p>
          </table:table-cell>
          <table:table-cell table:style-name="Tabla2.A1" office:value-type="string">
            <text:p text:style-name="Table_20_Contents"><text:span text:style-name="T3">W</text:span>{a}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office:value-type="string">
            <text:p text:style-name="Table_20_Contents">2️⃣ <text:span text:style-name="Source_20_Text">b := z - 1</text:span></text:p>
          </table:table-cell>
          <table:table-cell table:style-name="Tabla3.A1" office:value-type="string">
            <text:p text:style-name="Table_20_Contents"><text:span text:style-name="T3">R </text:span>{z} <text:s text:c="3"/></text:p>
          </table:table-cell>
          <table:table-cell table:style-name="Tabla3.A1" office:value-type="string">
            <text:p text:style-name="Table_20_Contents"><text:span text:style-name="T3">W</text:span>{b}</text:p>
          </table:table-cell>
        </table:table-row>
      </table:table>
      <table:table table:name="Tabla4" table:style-name="Tabla4">
        <table:table-column table:style-name="Tabla4.A"/>
        <table:table-column table:style-name="Tabla4.B"/>
        <table:table-column table:style-name="Tabla4.C"/>
        <table:table-row>
          <table:table-cell table:style-name="Tabla4.A1" office:value-type="string">
            <text:p text:style-name="Table_20_Contents">3️⃣ <text:span text:style-name="Source_20_Text">c := a - b</text:span></text:p>
          </table:table-cell>
          <table:table-cell table:style-name="Tabla4.A1" office:value-type="string">
            <text:p text:style-name="Table_20_Contents"><text:span text:style-name="T3">R</text:span>{a, b}</text:p>
          </table:table-cell>
          <table:table-cell table:style-name="Tabla4.A1" office:value-type="string">
            <text:p text:style-name="Table_20_Contents"><text:span text:style-name="T3">W</text:span>{c}</text:p>
          </table:table-cell>
        </table:table-row>
      </table:table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Table_20_Contents">4️⃣ <text:span text:style-name="Source_20_Text">w := c + 1</text:span></text:p>
          </table:table-cell>
          <table:table-cell table:style-name="Tabla5.A1" office:value-type="string">
            <text:p text:style-name="Table_20_Contents"><text:span text:style-name="T3">R</text:span>{c}</text:p>
          </table:table-cell>
          <table:table-cell table:style-name="Tabla5.A1" office:value-type="string">
            <text:p text:style-name="Table_20_Contents"><text:span text:style-name="T3">W</text:span>{w}</text:p>
          </table:table-cell>
        </table:table-row>
      </table:table>
      <text:p text:style-name="P2"/>
      <text:p text:style-name="P3">(1,2): SI <text:span text:style-name="T4">(</text:span><text:span text:style-name="T5">ambas instrucciones son independientes, <text:s/>se pueden ejecutar concurrentemente)</text:span></text:p>
      <text:p text:style-name="P4">(1,3): NO<text:span text:style-name="T6"> </text:span><text:span text:style-name="T4">( </text:span><text:span text:style-name="T7">3 </text:span><text:span text:style-name="T5">lee A</text:span><text:span text:style-name="T7">)</text:span></text:p>
      <text:p text:style-name="P3">(1,4): SI <text:span text:style-name="T4">(</text:span><text:span text:style-name="T5">ambas instrucciones son independientes, <text:s/>se pueden ejecutar concurrentemente)</text:span></text:p>
      <text:p text:style-name="P4">(2,3): NO <text:span text:style-name="T4">(</text:span><text:span text:style-name="T7"> 3 </text:span><text:span text:style-name="T5">lee B</text:span><text:span text:style-name="T7">)</text:span></text:p>
      <text:p text:style-name="P3">(2,4): SI <text:span text:style-name="T4">(</text:span><text:span text:style-name="T5">ambas instrucciones son independientes, <text:s/>se pueden ejecutar concurrentemente)</text:span></text:p>
      <text:p text:style-name="P5">(3,4): NO <text:span text:style-name="T7">( 4 </text:span><text:span text:style-name="T5">lee C</text:span><text:span text:style-name="T7">)</text:span></text:p>
      <text:p text:style-name="P6"><text:span text:style-name="T8">(1,2,3): NO</text:span><text:span text:style-name="T5"> (</text:span>3 depende de 1 y 2, <text:span text:style-name="T9">lee A y B)</text:span><text:span text:style-name="T5"> </text:span></text:p>
      <text:p text:style-name="P3"><text:span text:style-name="T10">(1,2,4): Si</text:span> <text:span text:style-name="T4">(</text:span><text:span text:style-name="T5">las instrucciones son independientes, <text:s/>se pueden ejecutar concurrentemente)</text:span></text:p>
      <text:p text:style-name="P7"><text:span text:style-name="Strong_20_Emphasis">(1,3,4): NO</text:span> (1 y 3 no son concurrentes )</text:p>
      <text:p text:style-name="P2"><text:span text:style-name="Strong_20_Emphasis">(2,3,4): NO</text:span> (2 y 3 no son concurrentes) </text:p>
      <text:p text:style-name="P2"/>
      <text:p text:style-name="P2"/>
      <text:p text:style-name="P2"/>
      <text:p text:style-name="P2"><text:span text:style-name="T2">2)</text:span> Intentar crear partiendo del código de teoría donde se crea un hilo, un programa que cree varios hilos (unos iguales y otros diferentes), pero que en su ejecución –salida por pantalla se indique que hilo es-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<text:soft-page-break/>Código:</text:p>
      <text:p text:style-name="P9"/>
      <text:p text:style-name="P9"/>
      <text:p text:style-name="P10" loext:marker-style-name="T11"><text:span text:style-name="T12">static class </text:span><text:span text:style-name="T11">HiloSimple </text:span><text:span text:style-name="T12">extends </text:span><text:span text:style-name="T11">Thread {<text:line-break/> <text:s text:c="3"/></text:span><text:span text:style-name="T12">private </text:span><text:span text:style-name="T11">String </text:span><text:span text:style-name="T13">nombre</text:span><text:span text:style-name="T11">;<text:line-break/><text:line-break/> <text:s text:c="3"/></text:span><text:span text:style-name="T12">public </text:span><text:span text:style-name="T14">HiloSimple</text:span><text:span text:style-name="T11">(String nombre) {<text:line-break/> <text:s text:c="7"/></text:span><text:span text:style-name="T12">this</text:span><text:span text:style-name="T11">.</text:span><text:span text:style-name="T13">nombre </text:span><text:span text:style-name="T11">= nombre;<text:line-break/> <text:s text:c="3"/>}<text:line-break/><text:line-break/> <text:s text:c="3"/></text:span><text:span text:style-name="T15">@Override<text:line-break/> <text:s text:c="3"/></text:span><text:span text:style-name="T12">public void </text:span><text:span text:style-name="T14">run</text:span><text:span text:style-name="T11">() {<text:line-break/> <text:s text:c="7"/></text:span><text:span text:style-name="T12">for </text:span><text:span text:style-name="T11">(</text:span><text:span text:style-name="T12">int </text:span><text:span text:style-name="T11">i = </text:span><text:span text:style-name="T16">1</text:span><text:span text:style-name="T11">; i &lt;= </text:span><text:span text:style-name="T16">5</text:span><text:span text:style-name="T11">; i++) {<text:line-break/> <text:s text:c="11"/>System.</text:span><text:span text:style-name="T17">out</text:span><text:span text:style-name="T11">.println(</text:span><text:span text:style-name="T18">"Ejecución " </text:span><text:span text:style-name="T11">+ i + </text:span><text:span text:style-name="T18">" del " </text:span><text:span text:style-name="T11">+ </text:span><text:span text:style-name="T13">nombre</text:span><text:span text:style-name="T11">);<text:line-break/> <text:s text:c="11"/></text:span><text:span text:style-name="T12">try </text:span><text:span text:style-name="T11">{<text:line-break/> <text:s text:c="15"/>Thread.</text:span><text:span text:style-name="T19">sleep</text:span><text:span text:style-name="T11">(</text:span><text:span text:style-name="T16">500</text:span><text:span text:style-name="T11">);<text:line-break/> <text:s text:c="11"/>} </text:span><text:span text:style-name="T12">catch </text:span><text:span text:style-name="T11">(InterruptedException e) {<text:line-break/> <text:s text:c="15"/>System.</text:span><text:span text:style-name="T17">out</text:span><text:span text:style-name="T11">.println(</text:span><text:span text:style-name="T13">nombre </text:span><text:span text:style-name="T11">+ </text:span><text:span text:style-name="T18">" interrumpido."</text:span><text:span text:style-name="T11">);<text:line-break/> <text:s text:c="11"/>}<text:line-break/> <text:s text:c="7"/>}<text:line-break/> <text:s text:c="7"/>System.</text:span><text:span text:style-name="T17">out</text:span><text:span text:style-name="T11">.println(</text:span><text:span text:style-name="T13">nombre </text:span><text:span text:style-name="T11">+ </text:span><text:span text:style-name="T18">" ha terminado."</text:span><text:span text:style-name="T11">);<text:line-break/> <text:s text:c="3"/>}<text:line-break/>}<text:line-break/><text:line-break/></text:span><text:span text:style-name="T12">public static void </text:span><text:span text:style-name="T14">main</text:span><text:span text:style-name="T11">(String[] args) {<text:line-break/> <text:s text:c="3"/>HiloSimple h1 = </text:span><text:span text:style-name="T12">new </text:span><text:span text:style-name="T11">HiloSimple(</text:span><text:span text:style-name="T18">"Hilo A"</text:span><text:span text:style-name="T11">);<text:line-break/> <text:s text:c="3"/>HiloSimple h2 = </text:span><text:span text:style-name="T12">new </text:span><text:span text:style-name="T11">HiloSimple(</text:span><text:span text:style-name="T18">"Hilo B"</text:span><text:span text:style-name="T11">);<text:line-break/> <text:s text:c="3"/>HiloSimple h3 = </text:span><text:span text:style-name="T12">new </text:span><text:span text:style-name="T11">HiloSimple(</text:span><text:span text:style-name="T18">"Hilo C"</text:span><text:span text:style-name="T11">);<text:line-break/><text:line-break/> <text:s text:c="3"/>h1.start();<text:line-break/> <text:s text:c="3"/>h2.start();<text:line-break/> <text:s text:c="3"/>h3.start();<text:line-break/><text:line-break/> <text:s text:c="3"/></text:span><text:span text:style-name="T12">for </text:span><text:span text:style-name="T11">(</text:span><text:span text:style-name="T12">int </text:span><text:span text:style-name="T11">i = </text:span><text:span text:style-name="T16">1</text:span><text:span text:style-name="T11">; i &lt;= </text:span><text:span text:style-name="T16">5</text:span><text:span text:style-name="T11">; i++) {<text:line-break/> <text:s text:c="7"/>System.</text:span><text:span text:style-name="T17">out</text:span><text:span text:style-name="T11">.println(</text:span><text:span text:style-name="T18">"&gt;&gt; Hilo principal (main) ejecución " </text:span><text:span text:style-name="T11">+ i);<text:line-break/> <text:s text:c="7"/></text:span><text:span text:style-name="T12">try </text:span><text:span text:style-name="T11">{<text:line-break/> <text:s text:c="11"/>Thread.</text:span><text:span text:style-name="T19">sleep</text:span><text:span text:style-name="T11">(</text:span><text:span text:style-name="T16">500</text:span><text:span text:style-name="T11">);<text:line-break/> <text:s text:c="7"/>} </text:span><text:span text:style-name="T12">catch </text:span><text:span text:style-name="T11">(InterruptedException e) {<text:line-break/> <text:s text:c="11"/>System.</text:span><text:span text:style-name="T17">out</text:span><text:span text:style-name="T11">.println(</text:span><text:span text:style-name="T18">"Hilo principal interrumpido."</text:span><text:span text:style-name="T11">);<text:line-break/> <text:s text:c="7"/>}<text:line-break/> <text:s text:c="3"/>}<text:line-break/><text:line-break/> <text:s text:c="3"/>System.</text:span><text:span text:style-name="T17">out</text:span><text:span text:style-name="T11">.println(</text:span><text:span text:style-name="T18">"Hilo principal terminado."</text:span><text:span text:style-name="T11">);<text:line-break/>}<text:line-break/>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>Imágenes de ejecución:</text:p>
      <text:p text:style-name="P9"/>
      <text:p text:style-name="P9"><draw:frame draw:style-name="fr2" draw:name="Imagen2" text:anchor-type="char" svg:width="17cm" svg:height="21.082cm" draw:z-index="1"><draw:image xlink:href="Pictures/10000001000002AF00000354ED368A70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31T16:09:30.667679600</meta:creation-date>
    <dc:date>2025-11-06T20:48:07.141528300</dc:date>
    <meta:editing-duration>PT23M14S</meta:editing-duration>
    <meta:editing-cycles>2</meta:editing-cycles>
    <meta:generator>LibreOffice/25.2.6.1$Windows_X86_64 LibreOffice_project/13f8d05e475a6b6572cdd8fe3af1421c659c51c2</meta:generator>
    <meta:document-statistic meta:table-count="5" meta:image-count="2" meta:object-count="0" meta:page-count="4" meta:paragraph-count="31" meta:word-count="313" meta:character-count="2128" meta:non-whitespace-character-count="1600"/>
  </office:meta>
</office:document-meta>
</file>